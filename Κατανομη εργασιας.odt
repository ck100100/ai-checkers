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04db06" officeooo:paragraph-rsid="0004db06" style:font-size-asian="9.60000038146973pt" style:font-weight-asian="normal" style:font-size-complex="11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1pt" fo:font-weight="normal" officeooo:rsid="0004db06" officeooo:paragraph-rsid="0004db06" style:font-size-asian="9.60000038146973pt" style:font-weight-asian="normal" style:font-size-complex="11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1pt" fo:font-weight="normal" officeooo:rsid="0004db06" officeooo:paragraph-rsid="0006b718" style:font-size-asian="9.60000038146973pt" style:font-weight-asian="normal" style:font-size-complex="11pt" style:font-weight-complex="normal"/>
    </style:style>
    <style:style style:name="P5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04db06" officeooo:paragraph-rsid="0006b718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officeooo:rsid="0006b718" officeooo:paragraph-rsid="0006b718" style:font-size-asian="9.60000038146973pt" style:font-weight-asian="normal" style:font-size-complex="11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1pt" fo:font-weight="normal" officeooo:rsid="0006b718" officeooo:paragraph-rsid="0006b718" style:font-size-asian="9.60000038146973pt" style:font-weight-asian="normal" style:font-size-complex="11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1pt" fo:font-weight="normal" officeooo:rsid="0006b718" officeooo:paragraph-rsid="0006b718" style:font-size-asian="9.60000038146973pt" style:font-weight-asian="normal" style:font-size-complex="11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1pt" fo:font-weight="normal" officeooo:rsid="0006b718" officeooo:paragraph-rsid="0006b718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language="el" fo:country="GR" fo:font-weight="normal" officeooo:rsid="0004db06" officeooo:paragraph-rsid="0004db06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el" fo:country="GR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06b718" style:text-blinking="false" fo:background-color="transparent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560608c5-7fff-5568-6afc-fb92034d20e6"/><text:span text:style-name="T1">Build an AI Agent to Play Checkers</text:span></text:p>
      <text:p text:style-name="P11"><text:span text:style-name="T1">κατανομή εργασίας</text:span></text:p>
      <text:p text:style-name="P2"><text:span text:style-name="T2"/></text:p>
      <text:p text:style-name="P2"><text:span text:style-name="T2">Δημήτρης Ψαλλίδας</text:span></text:p>
      <text:p text:style-name="P10"><text:span text:style-name="T2">1. Στο Παιχνιδι Νταμας ειχα την ευθυνη για </text:span><text:span text:style-name="T3">την</text:span><text:span text:style-name="T2">:</text:span></text:p>
      <text:list text:style-name="L1">
        <text:list-item>
          <text:p text:style-name="P4"><text:span text:style-name="T2">Δημιουργια και διαχειριση αντικηειμενων πιονιων, BoardState και BoardNod</text:span></text:p>
        </text:list-item>
        <text:list-item>
          <text:p text:style-name="P4"><text:span text:style-name="T2">Ευρεση και δημιουργια των επομενων, νομιμων κινησεων που μπορουν να γινουν απο ενα BoardState</text:span></text:p>
        </text:list-item>
        <text:list-item>
          <text:p text:style-name="P3"><text:span text:style-name="T3">Απεικονιση παιχνιδιων μεσω GUI</text:span></text:p>
        </text:list-item>
        <text:list-item>
          <text:p text:style-name="P7"><text:span text:style-name="T2">Debugging</text:span></text:p>
        </text:list-item>
      </text:list>
      <text:p text:style-name="P6"><text:span text:style-name="T2">2. Στον minimax algorithm with ab pruning:</text:span></text:p>
      <text:list text:style-name="L4">
        <text:list-item>
          <text:p text:style-name="P8"><text:span text:style-name="T2">δημιουργια σχεδιαγραμματος για την δομη του κωδικα minimax</text:span></text:p>
        </text:list-item>
        <text:list-item>
          <text:p text:style-name="P8"><text:span text:style-name="T2">δημιουργια βοηθητικων συναρτησεων</text:span></text:p>
        </text:list-item>
        <text:list-item>
          <text:p text:style-name="P8"><text:span text:style-name="T2">Debugging</text:span></text:p>
        </text:list-item>
      </text:list>
      <text:p text:style-name="P6"><text:span text:style-name="T2"/></text:p>
      <text:p text:style-name="P6"><text:span text:style-name="T2">3. Στο Machine Learning κομματι:</text:span></text:p>
      <text:list text:style-name="L5">
        <text:list-item>
          <text:p text:style-name="P9"><text:span text:style-name="T2">ερευνα, κωδικας και debugging</text:span></text:p>
        </text:list-item>
        <text:list-item>
          <text:p text:style-name="P9"><text:span text:style-name="T2">επιλογη και προσαρμογη παραμετρων και συναρτησεων</text:span></text:p>
        </text:list-item>
        <text:list-item>
          <text:p text:style-name="P9"><text:span text:style-name="T2">εκπαιδευση του μοντελου</text:span></text:p>
        </text:list-item>
      </text:list>
      <text:p text:style-name="P6"><text:span text:style-name="T2"/></text:p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"><text:span text:style-name="T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2:38:13.280573218</meta:creation-date>
    <dc:date>2025-04-30T13:07:57.280390550</dc:date>
    <meta:editing-duration>PT6M2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95" meta:character-count="605" meta:non-whitespace-character-count="537"/>
  </office:meta>
</office:document-meta>
</file>